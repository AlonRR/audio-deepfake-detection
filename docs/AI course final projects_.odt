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0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color="#1155cc" style:text-underline-style="solid" style:text-underline-width="auto" style:text-underline-color="font-color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9" style:family="paragraph" style:parent-style-name="Standard" style:list-style-name="WWNum1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">
      <style:paragraph-properties fo:margin-left="2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>
      <style:paragraph-properties fo:margin-top="0.1665in" fo:margin-bottom="0.1665in" loext:contextual-spacing="false" fo:line-height="100%"/>
      <style:text-properties style:text-underline-style="solid" style:text-underline-width="auto" style:text-underline-color="font-color"/>
    </style:style>
    <style:style style:name="P28" style:family="paragraph" style:parent-style-name="Standard" style:master-page-name="Standard">
      <style:paragraph-properties style:page-number="1"/>
    </style:style>
    <style:style style:name="P29" style:family="paragraph" style:parent-style-name="Heading_20_3">
      <style:paragraph-properties fo:margin-left="1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30" style:family="paragraph" style:parent-style-name="Heading_20_3">
      <style:paragraph-properties fo:margin-left="1.5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31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style:text-underline-style="solid" style:text-underline-width="auto" style:text-underline-color="font-color"/>
    </style:style>
    <style:style style:name="P32" style:family="paragraph" style:parent-style-name="Heading_20_3" style:list-style-name="WWNum1">
      <style:paragraph-properties fo:margin-left="0.5in" fo:margin-right="0in" fo:margin-top="0.1945in" fo:margin-bottom="0.0555in" loext:contextual-spacing="false" fo:line-height="100%" fo:keep-together="auto" fo:text-indent="-0.25in" style:auto-text-indent="false" fo:keep-with-next="auto"/>
    </style:style>
    <style:style style:name="P33" style:family="paragraph" style:parent-style-name="Heading_20_4">
      <style:paragraph-properties fo:margin-left="0.5in" fo:margin-right="0in" fo:margin-top="0.1665in" fo:margin-bottom="0.028in" loext:contextual-spacing="false" fo:line-height="100%" fo:keep-together="auto" fo:text-indent="0in" style:auto-text-indent="false" fo:keep-with-next="auto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I course final projects:</text:p>
      <text:p text:style-name="Standard"/>
      <text:p text:style-name="Standard">All projects must include:</text:p>
      <text:list xml:id="list3642696026" text:style-name="WWNum5">
        <text:list-item>
          <text:p text:style-name="P2">Short presentation explaining the subjects, goal , challenges</text:p>
        </text:list-item>
        <text:list-item>
          <text:p text:style-name="P2">Related work section - scanning methods that have been used so far and your innovation.</text:p>
        </text:list-item>
      </text:list>
      <text:p text:style-name="P8"/>
      <text:list xml:id="list12342765970195" text:continue-numbering="true" text:style-name="WWNum5">
        <text:list-item>
          <text:p text:style-name="P2">Implementation of one the works suggested - the implementation stage must not be a one shot implementation but “show the process”, what failed how you analyzed it? What did you try to improve.</text:p>
        </text:list-item>
        <text:list-item>
          <text:p text:style-name="P2">More than one try - show the learning curve and how you scanned and found the hyper-parameters. Show one try why it didn’t work, analyse, explain and defend your decision on how you think you can improve.</text:p>
        </text:list-item>
        <text:list-item>
          <text:p text:style-name="P2">Advantage: Implement your own ideas and try to compare with others results (does not have to be better) </text:p>
        </text:list-item>
      </text:list>
      <text:p text:style-name="P8"/>
      <text:p text:style-name="P8">Please ask before, if you are not sure about the details, the data size or model size required.</text:p>
      <text:p text:style-name="P11"/>
      <text:p text:style-name="P11"/>
      <text:list xml:id="list1052902130" text:style-name="WWNum1">
        <text:list-item>
          <text:p text:style-name="P3"><text:span text:style-name="T2">What is RAG?</text:span></text:p>
        </text:list-item>
      </text:list>
      <text:p text:style-name="P1"/>
      <text:p text:style-name="P8">RAG (Retrieval-Augmented Generation) is a technique that combines:</text:p>
      <text:p text:style-name="P8"/>
      <text:p text:style-name="P8">Retrieval – finding relevant information from an external knowledge source.</text:p>
      <text:p text:style-name="P8">Generation – using an LLM to generate an answer based on the retrieved information.</text:p>
      <text:p text:style-name="P8"/>
      <text:p text:style-name="P8">Instead of relying only on what the model learned during training, RAG allows the model to consult a database, documents, PDFs, websites, code repositories, or any other knowledge source at inference time.</text:p>
      <text:p text:style-name="P8">Explain how you chunk your data , how to vectorize , how to search? </text:p>
      <text:p text:style-name="P8">Implement several alternatives.</text:p>
      <text:p text:style-name="Standard"/>
      <text:list xml:id="list12343618449924" text:continue-numbering="true" text:style-name="WWNum1">
        <text:list-item>
          <text:p text:style-name="P4"><text:span text:style-name="T2">LoRA. <text:s/>Lora </text:span><text:s/>is a parameter-efficient fine-tuning technique for large neural networks, especially LLMs. Instead of updating <text:span text:style-name="T2">all model weights</text:span> during fine-tuning, LoRA freezes the original model and learns a small set of additional matrices that modify the behavior of selected layers.</text:p>
        </text:list-item>
      </text:list>
      <text:p text:style-name="P9"><text:soft-page-break/>Explain how you chose the rank, measure the increased performance, try several architectures.</text:p>
      <text:list xml:id="list12342986436991" text:continue-numbering="true" text:style-name="WWNum1">
        <text:list-item>
          <text:p text:style-name="P5"><text:span text:style-name="T2">Medical Image Segmentation with Transformers</text:span></text:p>
        </text:list-item>
      </text:list>
      <text:list xml:id="list3218411675" text:style-name="WWNum4">
        <text:list-item>
          <text:list>
            <text:list-item>
              <text:p text:style-name="P12">Use vision transformers (e.g., Swin Transformer) to segment tumors or organs from CT/MRI scans. </text:p>
            </text:list-item>
            <text:list-item>
              <text:p text:style-name="P12">Use the attention layer to create an <text:span text:style-name="T2">explanation</text:span> of the decision.<text:line-break/></text:p>
            </text:list-item>
            <text:list-item>
              <text:p text:style-name="P15">Dataset:<text:a xlink:type="simple" xlink:href="http://medicaldecathlon.com/" text:style-name="ListLabel_20_55" text:visited-style-name="ListLabel_20_55"> </text:a><text:a xlink:type="simple" xlink:href="http://medicaldecathlon.com/" text:style-name="ListLabel_20_56" text:visited-style-name="ListLabel_20_56"><text:span text:style-name="T3">Medical Segmentation Decathlon</text:span></text:a></text:p>
            </text:list-item>
          </text:list>
        </text:list-item>
      </text:list>
      <text:p text:style-name="P10"/>
      <text:list xml:id="list12344443078834" text:continue-list="list12342986436991" text:style-name="WWNum1">
        <text:list-item>
          <text:p text:style-name="P4"><text:span text:style-name="T2">Morphing detection </text:span></text:p>
        </text:list-item>
      </text:list>
      <text:p text:style-name="P18">use at least two facial images to create morphed images.<text:line-break/>You may use tools like OpenCV, FaceMorpher, or custom algorithms.<text:line-break/>Submit:<text:line-break/></text:p>
      <text:list xml:id="list12342660954582" text:continue-numbering="true" text:style-name="WWNum1">
        <text:list-item>
          <text:list>
            <text:list-item>
              <text:p text:style-name="P19">At least 5 pairs of original faces and their morphed results.<text:line-break/></text:p>
            </text:list-item>
            <text:list-item>
              <text:p text:style-name="P21">A short report (max 2 pages) describing:<text:line-break/></text:p>
              <text:list>
                <text:list-item>
                  <text:p text:style-name="P25">Method used<text:line-break/></text:p>
                </text:list-item>
                <text:list-item>
                  <text:p text:style-name="P25">Landmark alignment strategy<text:line-break/></text:p>
                </text:list-item>
                <text:list-item>
                  <text:p text:style-name="P25">Interpolation technique<text:line-break/></text:p>
                </text:list-item>
                <text:list-item>
                  <text:p text:style-name="P26">Observations and limitations<text:line-break/></text:p>
                </text:list-item>
              </text:list>
            </text:list-item>
          </text:list>
        </text:list-item>
      </text:list>
      <text:p text:style-name="P29"><text:bookmark text:name="_tz0sctj3bpxw"/><text:span text:style-name="T4">Part 2: Morphing Detection- choose an article (starting from from 2020) on detection and implement it </text:span><text:span text:style-name="T7">.</text:span></text:p>
      <text:list xml:id="list12343282863193" text:continue-numbering="true" text:style-name="WWNum1">
        <text:list-item>
          <text:p text:style-name="P4"><text:span text:style-name="T2">Audio deep fakes creation and recognition.</text:span></text:p>
        </text:list-item>
      </text:list>
      <text:p text:style-name="P18">Clone the voice of a speaker using a small dataset (e.g., 1–5 minutes of speech).Synthesize at least 10 audio clips with varying lengths and complexity.</text:p>
      <text:p text:style-name="P18">wainEvaluate the quality using metrics such as:</text:p>
      <text:list xml:id="list3273416886" text:style-name="WWNum2">
        <text:list-item>
          <text:p text:style-name="P20">MOS (Mean Opinion Score)</text:p>
        </text:list-item>
        <text:list-item>
          <text:p text:style-name="P22">Spectrogram similarity</text:p>
        </text:list-item>
        <text:list-item>
          <text:p text:style-name="P24">Voice conversion similarity (speaker embedding cosine similarity)</text:p>
        </text:list-item>
      </text:list>
      <text:p text:style-name="P30"><text:bookmark text:name="_9ivo1pt7wdox"/><text:span text:style-name="T4">Part 2: Detection- choose an article (starting from 2020) on detection and implement it </text:span></text:p>
      <text:p text:style-name="P9"/>
      <text:list xml:id="list12344152927442" text:continue-list="list12343282863193" text:style-name="WWNum1">
        <text:list-item>
          <text:p text:style-name="P6"><text:span text:style-name="T2">Diffusion Models for Artwork Generation<text:line-break/></text:span></text:p>
        </text:list-item>
      </text:list>
      <text:list xml:id="list3931206009" text:style-name="WWNum3">
        <text:list-item>
          <text:list>
            <text:list-item>
              <text:p text:style-name="P13">Implement and fine-tune a simplified Stable Diffusion model for a custom art style.<text:line-break/></text:p>
            </text:list-item>
            <text:list-item>
              <text:p text:style-name="P13"><text:s/></text:p>
            </text:list-item>
          </text:list>
        </text:list-item>
      </text:list>
      <text:list xml:id="list12342688044787" text:continue-list="list12344152927442" text:style-name="WWNum1">
        <text:list-item>
          <text:p text:style-name="P7"><text:soft-page-break/><text:span text:style-name="T2">Games and Q learning.</text:span></text:p>
        </text:list-item>
      </text:list>
      <text:p text:style-name="P9">Build a simple game where the user needs to reach a starting point and end at an endpoint with the ability to collect “gifts” on the way.</text:p>
      <text:p text:style-name="P9">Objective: find the <text:span text:style-name="T8">shortest path from begi</text:span>nning to end and collect as many scores as possible. train an <text:span text:style-name="T2">RL agent</text:span> using <text:span text:style-name="T2">Deep Q-Networks (DQN) </text:span></text:p>
      <text:p text:style-name="P9">You can integrate a game engine like <text:span text:style-name="T2">Pygame</text:span> or use <text:span text:style-name="T2">Unity ML-Agents</text:span>.</text:p>
      <text:p text:style-name="P31"><text:bookmark text:name="_am6zd8tdlo9p"/></text:p>
      <text:list xml:id="list12343484216142" text:continue-numbering="true" text:style-name="WWNum1">
        <text:list-item>
          <text:p text:style-name="P32"><text:bookmark text:name="_b1s4ck11ycb3"/><text:span text:style-name="T6">Knowledge Distillation for Language Models</text:span></text:p>
        </text:list-item>
      </text:list>
      <text:p text:style-name="P9"><text:span text:style-name="T2">Goal:</text:span> Perform distillation from a teacher LLM to a smaller student model.</text:p>
      <text:p text:style-name="P33"><text:bookmark text:name="_a6mun0u1uvny"/><text:span text:style-name="T5">Tasks:</text:span></text:p>
      <text:list xml:id="list3346871065" text:style-name="WWNum6">
        <text:list-item>
          <text:p text:style-name="P17">Choose a <text:span text:style-name="T2">teacher model</text:span> (e.g., GPT-2-large, LLaMA, Mistral, or any HuggingFace LLM).<text:line-break/></text:p>
        </text:list-item>
        <text:list-item>
          <text:p text:style-name="P14">Choose or design a <text:span text:style-name="T2">student model</text:span> (e.g., GPT-2-small, DistilGPT, TinyLLaMA).<text:line-break/></text:p>
        </text:list-item>
        <text:list-item>
          <text:p text:style-name="P14">Use <text:span text:style-name="T2">teacher-student training</text:span>:<text:line-break/></text:p>
          <text:list>
            <text:list-item>
              <text:p text:style-name="P23">Align logits, hidden states, or next-token probabilities.<text:line-break/></text:p>
            </text:list-item>
            <text:list-item>
              <text:p text:style-name="P23">Use <text:span text:style-name="T2">KD losses</text:span> (e.g., KL divergence) in addition to task loss.<text:line-break/></text:p>
            </text:list-item>
          </text:list>
        </text:list-item>
        <text:list-item>
          <text:p text:style-name="P16">Train on a small corpus of general text or domain-specific data (e.g., recent news, scientific articles).<text:line-break/></text:p>
        </text:list-item>
      </text:list>
      <text:p text:style-name="P2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3" meta:word-count="636" meta:character-count="3934" meta:non-whitespace-character-count="3357"/>
    <meta:generator>LibreOfficeDev/6.0.5.2$Linux_X86_64 LibreOffice_project/</meta:generator>
  </office:meta>
</office:document-meta>
</file>